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07f3" officeooo:paragraph-rsid="000907f3"/>
    </style:style>
    <style:style style:name="P2" style:family="paragraph" style:parent-style-name="Standard">
      <style:paragraph-properties fo:margin-left="0in" fo:margin-right="0in" fo:margin-top="0.1252in" fo:margin-bottom="0.1665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rsid="000907f3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0907f3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rsid="000907f3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officeooo:rsid="000907f3"/>
    </style:style>
    <style:style style:name="T1" style:family="text">
      <style:text-properties style:text-line-through-style="none" style:text-line-through-type="none" fo:font-family="'Google Sans', Arial, sans-serif" fo:font-size="12pt" style:text-underline-style="none" fo:font-weight="bold" style:text-blinking="false" loext:padding="0in" loext:border="none"/>
    </style:style>
    <style:style style:name="T2" style:family="text">
      <style:text-properties style:text-line-through-style="none" style:text-line-through-type="none" fo:font-family="'Google Sans', Arial, sans-serif" fo:font-size="12pt" style:text-underline-style="none" fo:font-weight="normal" style:text-blinking="false" loext:padding="0in" loext:border="none"/>
    </style:style>
    <style:style style:name="T3" style:family="text">
      <style:text-properties style:text-line-through-style="none" style:text-line-through-type="none" fo:font-family="'Google Sans', Arial, sans-serif" fo:font-size="12pt" style:text-underline-style="solid" style:text-underline-width="auto" style:text-underline-color="font-color" fo:font-weight="normal" style:text-blinking="false" loext:padding="0in" loext:border="none"/>
    </style:style>
    <style:style style:name="T4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f3f5f6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atos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Tipos de Algoritmos de Ordenamiento (Sort)</text:span></text:span></text:p>
      <text:p text:style-name="P2"><text:span text:style-name="T2">Existen múltiples algoritmos de ordenamiento, clasificados según su eficiencia, uso de memoria y estabilidad: [</text:span><text:a xlink:type="simple" xlink:href="https://www.studysmarter.es/resumenes/ciencias-de-la-computacion/algoritmos-en-ciencias-de-la-computacion/algoritmos-de-ordenacion/" text:style-name="Internet_20_link" text:visited-style-name="Visited_20_Internet_20_Link"><text:span text:style-name="T3">1</text:span></text:a><text:span text:style-name="T2">, </text:span><text:a xlink:type="simple" xlink:href="https://www.studysmarter.es/resumenes/ciencias-de-la-computacion/algoritmos-en-ciencias-de-la-computacion/ordenamiento-rapido/" text:style-name="Internet_20_link" text:visited-style-name="Visited_20_Internet_20_Link"><text:span text:style-name="T3">2</text:span></text:a><text:span text:style-name="T2">, </text:span><text:a xlink:type="simple" xlink:href="https://groups.google.com/g/spc-l/c/HE_xIeZ4GU8" text:style-name="Internet_20_link" text:visited-style-name="Visited_20_Internet_20_Link"><text:span text:style-name="T3">3</text:span></text:a><text:span text:style-name="T2">, </text:span><text:a xlink:type="simple" xlink:href="https://www.happycoders.eu/algorithms/quicksort/" text:style-name="Internet_20_link" text:visited-style-name="Visited_20_Internet_20_Link"><text:span text:style-name="T3">4</text:span></text:a><text:span text:style-name="T2">]</text:span></text:p>
      <text:list text:style-name="L1">
        <text:list-item>
          <text:p text:style-name="P3"><text:span text:style-name="Strong_20_Emphasis"><text:span text:style-name="T1">Basados en Comparación (Comparación Directa):</text:span></text:span></text:p>
          <text:list>
            <text:list-item>
              <text:p text:style-name="P3"><text:span text:style-name="Strong_20_Emphasis"><text:span text:style-name="T1">Quicksort:</text:span></text:span><text:span text:style-name="T2"> Rápido, divide y vencerás.</text:span></text:p>
            </text:list-item>
            <text:list-item>
              <text:p text:style-name="P3"><text:span text:style-name="Strong_20_Emphasis"><text:span text:style-name="T1">Mergesort (Ordenamiento por Mezcla):</text:span></text:span><text:span text:style-name="T2"> Estable, \(O(n \log n)\) garantizado, usa memoria extra.</text:span></text:p>
            </text:list-item>
            <text:list-item>
              <text:p text:style-name="P3"><text:span text:style-name="Strong_20_Emphasis"><text:span text:style-name="T1">Heapsort:</text:span></text:span><text:span text:style-name="T2"> Basado en estructuras de datos montículo (heap), eficiente en memoria.</text:span></text:p>
            </text:list-item>
            <text:list-item>
              <text:p text:style-name="P3"><text:span text:style-name="Strong_20_Emphasis"><text:span text:style-name="T1">Insertion Sort (Inserción):</text:span></text:span><text:span text:style-name="T2"> Eficiente para listas pequeñas o casi ordenadas.</text:span></text:p>
            </text:list-item>
            <text:list-item>
              <text:p text:style-name="P3"><text:span text:style-name="Strong_20_Emphasis"><text:span text:style-name="T1">Bubble Sort (Burbuja):</text:span></text:span><text:span text:style-name="T2"> Simple, pero ineficiente (\(O(n^2)\)).</text:span></text:p>
            </text:list-item>
            <text:list-item>
              <text:p text:style-name="P3"><text:span text:style-name="Strong_20_Emphasis"><text:span text:style-name="T1">Selection Sort (Selección):</text:span></text:span><text:span text:style-name="T2"> Busca el mínimo y lo mueve al principio.</text:span></text:p>
            </text:list-item>
            <text:list-item>
              <text:p text:style-name="P3"><text:span text:style-name="Strong_20_Emphasis"><text:span text:style-name="T1">Shellsort:</text:span></text:span><text:span text:style-name="T2"> Mejora del ordenamiento por inserción.</text:span></text:p>
            </text:list-item>
          </text:list>
        </text:list-item>
        <text:list-item>
          <text:p text:style-name="P3"><text:span text:style-name="Strong_20_Emphasis"><text:span text:style-name="T1">No Basados en Comparación (Lineales):</text:span></text:span></text:p>
          <text:list>
            <text:list-item>
              <text:p text:style-name="P3"><text:span text:style-name="Strong_20_Emphasis"><text:span text:style-name="T1">Counting Sort (Ordenamiento por Cuentas):</text:span></text:span><text:span text:style-name="T2"> Útil para rangos pequeños de números.</text:span></text:p>
            </text:list-item>
            <text:list-item>
              <text:p text:style-name="P3"><text:span text:style-name="Strong_20_Emphasis"><text:span text:style-name="T1">Radix Sort:</text:span></text:span><text:span text:style-name="T2"> Ordena número por número (dígito a dígito). [</text:span><text:a xlink:type="simple" xlink:href="https://rosettacode.org/wiki/Sorting_algorithms/Quicksort" text:style-name="Internet_20_link" text:visited-style-name="Visited_20_Internet_20_Link"><text:span text:style-name="T3">1</text:span></text:a><text:span text:style-name="T2">, </text:span><text:a xlink:type="simple" xlink:href="https://translate.google.com/translate?u=https://en.wikipedia.org/wiki/Shellsort&amp;hl=es&amp;sl=en&amp;tl=es&amp;client=sge" text:style-name="Internet_20_link" text:visited-style-name="Visited_20_Internet_20_Link"><text:span text:style-name="T3">2</text:span></text:a><text:span text:style-name="T2">, </text:span><text:a xlink:type="simple" xlink:href="https://www.youtube.com/watch?v=UrPJLhKF1jY" text:style-name="Internet_20_link" text:visited-style-name="Visited_20_Internet_20_Link"><text:span text:style-name="T3">3</text:span></text:a><text:span text:style-name="T2">, </text:span><text:a xlink:type="simple" xlink:href="https://en.wikipedia.org/wiki/Quicksort" text:style-name="Internet_20_link" text:visited-style-name="Visited_20_Internet_20_Link"><text:span text:style-name="T3">4</text:span></text:a><text:span text:style-name="T2">, </text:span><text:a xlink:type="simple" xlink:href="https://www.happycoders.eu/algorithms/quicksort/" text:style-name="Internet_20_link" text:visited-style-name="Visited_20_Internet_20_Link"><text:span text:style-name="T3">5</text:span></text:a><text:span text:style-name="T2">]</text:span></text:p>
            </text:list-item>
          </text:list>
        </text:list-item>
      </text:list>
      <text:p text:style-name="P4"><text:span text:style-name="Strong_20_Emphasis"><text:span text:style-name="T1">Variaciones y Características de Quicksort</text:span></text:span></text:p>
      <text:list text:style-name="L2">
        <text:list-item>
          <text:p text:style-name="P5"><text:span text:style-name="Strong_20_Emphasis"><text:span text:style-name="T1">Partición de Lomuto/Hoare:</text:span></text:span><text:span text:style-name="T2"> Diferentes formas de particionar el arreglo.</text:span></text:p>
        </text:list-item>
        <text:list-item>
          <text:p text:style-name="P5"><text:span text:style-name="Strong_20_Emphasis"><text:span text:style-name="T1">Quicksort Paralelo:</text:span></text:span><text:span text:style-name="T2"> Divide el trabajo en múltiples hilos.</text:span></text:p>
        </text:list-item>
        <text:list-item>
          <text:p text:style-name="P6"><text:span text:style-name="Strong_20_Emphasis"><text:span text:style-name="T1">Dual-Pivot Quicksort:</text:span></text:span><text:span text:style-name="T2"> Utilizado en librerías modernas (como </text:span><text:span text:style-name="Source_20_Text"><text:span text:style-name="T4">Arrays.sort</text:span></text:span><text:span text:style-name="T2"> en Java) para mejorar el rendimiento. [</text:span><text:a xlink:type="simple" xlink:href="https://www.youtube.com/watch?v=vT358ZA_Pjg#:~:text=En%20este%20video%20se%20implementa%20el%20algoritmo,partición%20de%20Lomuto%20y%20la%20partición%20de" text:style-name="Internet_20_link" text:visited-style-name="Visited_20_Internet_20_Link"><text:span text:style-name="T3">1</text:span></text:a><text:span text:style-name="T2">, </text:span><text:a xlink:type="simple" xlink:href="https://translate.google.com/translate?u=https://ijartet.com/3050/v5s03jan2018ieae/conference&amp;hl=es&amp;sl=en&amp;tl=es&amp;client=sge" text:style-name="Internet_20_link" text:visited-style-name="Visited_20_Internet_20_Link"><text:span text:style-name="T3">2</text:span></text:a><text:span text:style-name="T2">, </text:span><text:a xlink:type="simple" xlink:href="https://www.happycoders.eu/algorithms/quicksort/" text:style-name="Internet_20_link" text:visited-style-name="Visited_20_Internet_20_Link"><text:span text:style-name="T3">3</text:span></text:a><text:span text:style-name="T2">]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7:04:15.160412513</meta:creation-date>
    <dc:date>2026-05-04T19:18:28.137146981</dc:date>
    <meta:editing-duration>PT2H4M</meta:editing-duration>
    <meta:editing-cycles>1</meta:editing-cycles>
    <meta:document-statistic meta:table-count="0" meta:image-count="0" meta:object-count="0" meta:page-count="1" meta:paragraph-count="18" meta:word-count="177" meta:character-count="1182" meta:non-whitespace-character-count="1037"/>
    <meta:generator>LibreOffice/26.2.2.2$Linux_X86_64 LibreOffice_project/620$Build-2</meta:generator>
  </office:meta>
</office:document-meta>
</file>